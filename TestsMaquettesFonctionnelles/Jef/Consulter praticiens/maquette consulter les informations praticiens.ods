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4.974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e2efda" fo:wrap-option="wrap" fo:border="0.06pt solid #000000" style:vertical-align="top"/>
      <style:text-properties style:font-name="Arial" fo:font-size="11pt" style:font-name-asian="Microsoft YaHei" style:font-size-asian="11pt" style:font-name-complex="Calibri" style:font-size-complex="11pt"/>
    </style:style>
    <style:style style:name="ce5" style:family="table-cell" style:parent-style-name="Default" style:data-style-name="N0">
      <style:table-cell-properties fo:background-color="#e2efda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e2efda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Arial" fo:font-size="11pt" style:font-size-asian="11pt" style:font-size-complex="11pt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1" style:family="table-cell" style:parent-style-name="Default"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/>
        <table:table-column table:style-name="co7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15" office:value-type="string" calcext:value-type="string" table:number-columns-spanned="5" table:number-rows-spanned="3">
            <text:p>Test de l’USR : Consulter praticiens</text:p>
          </table:table-cell>
          <table:covered-table-cell table:number-columns-repeated="4"/>
          <table:table-cell table:style-name="ce4" table:number-columns-repeated="16378"/>
        </table:table-row>
        <table:table-row table:style-name="ro1">
          <table:covered-table-cell table:number-columns-repeated="6"/>
          <table:table-cell table:style-name="ce4" table:number-columns-repeated="16378"/>
        </table:table-row>
        <table:table-row table:style-name="ro1">
          <table:covered-table-cell table:number-columns-repeated="6"/>
          <table:table-cell table:style-name="ce4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/>
          <table:table-cell table:style-name="ce4" table:number-columns-repeated="16378"/>
        </table:table-row>
        <table:table-row table:style-name="ro3"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Le visiteur demande à consulter les informations praticiens.</text:p>
            <text:p>Cliquer sur "Praticiens" dans la barre de navigation.</text:p>
            <text:p/>
            <text:p>Compte Délégué (login : leclud, mdp : LecLud!)</text:p>
          </table:table-cell>
          <table:table-cell table:style-name="ce16" office:value-type="string" calcext:value-type="string">
            <text:p>Le système affiche la page de gestion des praticiens avec une liste déroulante de tous les praticiens de la régions.</text:p>
          </table:table-cell>
          <table:table-cell table:style-name="ce24" office:value-type="string" calcext:value-type="string">
            <text:p><text:span text:style-name="T1">Page "Gérer les praticiens" affichée avec :</text:span></text:p>
            <text:p><text:span text:style-name="T1">• Liste déroulante "Praticiens disponibles"</text:span></text:p>
            <text:p><text:span text:style-name="T1">• Boutons "Nom" / "Numéro" pour le tri</text:span></text:p>
            <text:p><text:span text:style-name="T1">• Boutons "Tous" / "Modifiables" pour le filtrage</text:span></text:p>
            <text:p><text:span text:style-name="T1">• Bouton "Afficher les informations"</text:span></text:p>
            <text:p><text:span text:style-name="T1">• Bouton "+ Créer un nouveau praticien"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4">
          <table:table-cell table:style-name="ce16" office:value-type="string" calcext:value-type="string">
            <text:p>2, 3</text:p>
          </table:table-cell>
          <table:table-cell table:style-name="ce16" office:value-type="string" calcext:value-type="string">
            <text:p>Le visiteur sélectionne un praticien dans la liste déroulante puis valide.</text:p>
            <text:p/>
            <text:p>Trier par Numéro, afficher Ma Région  sélectionner "Delahaye André (n°3)" puis cliquer sur "Afficher les informations".</text:p>
          </table:table-cell>
          <table:table-cell table:style-name="ce16" office:value-type="string" calcext:value-type="string">
            <text:p>Le système affiche les informations du praticien sélectionné :</text:p>
            <text:p>- Numéro, Nom, Prénom</text:p>
            <text:p>- Adresse, CP, Ville</text:p>
            <text:p>- Coefficient de notoriété, Coefficient de confiance</text:p>
            <text:p>- Type de praticien</text:p>
            <text:p>- Spécialités (diplôme)</text:p>
          </table:table-cell>
          <table:table-cell table:style-name="ce24" office:value-type="string" calcext:value-type="string">
            <text:p><text:span text:style-name="T1">Affichage des informations du praticien :</text:span></text:p>
            <text:p><text:span text:style-name="T1">• Numéro : 3, Nom : Delahaye, Prénom : andré</text:span></text:p>
            <text:p><text:span text:style-name="T1">• Adresse : 36 av 6 Juin</text:span></text:p>
            <text:p><text:span text:style-name="T1">• CP : 25000, Ville : BESANCON</text:span></text:p>
            <text:p><text:span text:style-name="T1">• Coef. notoriété : 55, Coef. Confiance : 185,79</text:span></text:p>
            <text:p><text:span text:style-name="T1">• Type : Personnel de santé (PS)</text:span></text:p>
            <text:p><text:span text:style-name="T1">• Spécialités : Aucune spécialité renseignée</text:span></text:p>
            <text:p><text:span text:style-name="T1">Boutons "Modifier ce praticien" et "Retour à la liste" disponibles.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5">
          <table:table-cell table:style-name="ce16" office:value-type="string" calcext:value-type="string">
            <text:p>3-a</text:p>
          </table:table-cell>
          <table:table-cell table:style-name="ce16" office:value-type="string" calcext:value-type="string">
            <text:p>Le visiteur tente de valider sans sélectionner de praticien.</text:p>
            <text:p>(Laisser "- Choisissez un praticien -" et cliquer sur "Afficher les informations")</text:p>
          </table:table-cell>
          <table:table-cell table:style-name="ce16" office:value-type="string" calcext:value-type="string">
            <text:p>Le système affiche un message demandant de choisir un praticien dans la liste.</text:p>
          </table:table-cell>
          <table:table-cell table:style-name="ce24" office:value-type="string" calcext:value-type="string">
            <text:p><text:s/>Le système affiche "Vous devez choisir un praticien dans la liste."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3"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Le visiteur filtre les praticiens modifiables en cliquant sur "Ma Région".</text:p>
          </table:table-cell>
          <table:table-cell table:style-name="ce16" office:value-type="string" calcext:value-type="string">
            <text:p>Le système n'affiche que les praticiens de la région/secteur du délégué.</text:p>
          </table:table-cell>
          <table:table-cell table:style-name="ce24" office:value-type="string" calcext:value-type="string">
            <text:p><text:span text:style-name="T1">La liste est réduite à 7 praticiens de la région FC :</text:span></text:p>
            <text:p><text:span text:style-name="T1">Alliet-Grach Thierry (n°81), Bobichon Tristan (n°84), Delahaye André (n°3), Goessens Marc (n°49), Marie Frédérique (n°30), Martin Frédéric (n°29), Maury Jean-François (n°39).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6">
          <table:table-cell table:style-name="ce16" office:value-type="string" calcext:value-type="string">
            <text:p>4-a</text:p>
          </table:table-cell>
          <table:table-cell table:style-name="ce16" office:value-type="string" calcext:value-type="string">
            <text:p>Le visiteur sélectionne un praticien modifiable de sa région.</text:p>
            <text:p/>
            <text:p>Sélectionner "Delahaye André (n°3)" à Besançon.</text:p>
          </table:table-cell>
          <table:table-cell table:style-name="ce16" office:value-type="string" calcext:value-type="string">
            <text:p>Le système affiche les informations du praticien avec le bouton "Modifier" disponible.</text:p>
          </table:table-cell>
          <table:table-cell table:style-name="ce24" office:value-type="string" calcext:value-type="string">
            <text:p>Praticien affiché en consultation avec bouton "Modifier ce praticien" visible car il appartient à la région FC.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7">
          <table:table-cell table:style-name="ce9"/>
          <table:table-cell table:style-name="ce8" table:number-columns-repeated="2"/>
          <table:table-cell table:style-name="ce5"/>
          <table:table-cell table:style-name="ce29" table:formula="of:=IF(EXACT([.B10]; &quot;&quot;); &quot;&quot;; IF(EXACT([.F10]; &quot;&quot;); &quot;Non saisie&quot;; IF(EXACT([.F10]; &quot;ok&quot;); &quot;Conforme&quot;; &quot;Non conforme&quot;)))">
            <text:p/>
          </table:table-cell>
          <table:table-cell table:style-name="ce7"/>
          <table:table-cell table:style-name="ce4" table:number-columns-repeated="16378"/>
        </table:table-row>
        <table:table-row table:style-name="ro8">
          <table:table-cell table:style-name="ce9"/>
          <table:table-cell table:style-name="ce8"/>
          <table:table-cell table:style-name="ce9"/>
          <table:table-cell table:style-name="ce5"/>
          <table:table-cell table:style-name="ce29" table:formula="of:=IF(EXACT([.B11]; &quot;&quot;); &quot;&quot;; IF(EXACT([.F11]; &quot;&quot;); &quot;Non saisie&quot;; IF(EXACT([.F11]; &quot;ok&quot;); &quot;Conforme&quot;; &quot;Non conforme&quot;)))">
            <text:p/>
          </table:table-cell>
          <table:table-cell table:style-name="ce7"/>
          <table:table-cell table:style-name="ce4" table:number-columns-repeated="16378"/>
        </table:table-row>
        <table:table-row table:style-name="ro8">
          <table:table-cell table:style-name="ce9"/>
          <table:table-cell table:style-name="ce8"/>
          <table:table-cell table:style-name="ce9"/>
          <table:table-cell table:style-name="ce11"/>
          <table:table-cell table:style-name="ce29" table:formula="of:=IF(EXACT([.B12]; &quot;&quot;); &quot;&quot;; IF(EXACT([.F12]; &quot;&quot;); &quot;Non saisie&quot;; IF(EXACT([.F12]; &quot;ok&quot;); &quot;Conforme&quot;; &quot;Non conforme&quot;)))">
            <text:p/>
          </table:table-cell>
          <table:table-cell table:style-name="ce7"/>
          <table:table-cell table:style-name="ce4" table:number-columns-repeated="16378"/>
        </table:table-row>
        <table:table-row table:style-name="ro8">
          <table:table-cell/>
          <table:table-cell table:style-name="ce8"/>
          <table:table-cell table:style-name="ce9"/>
          <table:table-cell table:style-name="ce11"/>
          <table:table-cell table:style-name="ce29"/>
          <table:table-cell table:style-name="ce7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>
          <table:table-cell table:number-columns-repeated="4"/>
          <table:table-cell table:style-name="ce30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8" table:number-rows-repeated="6">
          <table:table-cell table:number-columns-repeated="4"/>
          <table:table-cell table:style-name="ce31"/>
          <table:table-cell/>
          <table:table-cell table:style-name="ce4" table:number-columns-repeated="16378"/>
        </table:table-row>
        <table:table-row table:style-name="ro9" table:number-rows-repeated="9757">
          <table:table-cell table:number-columns-repeated="4"/>
          <table:table-cell table:style-name="ce31"/>
          <table:table-cell/>
          <table:table-cell table:style-name="ce4" table:number-columns-repeated="16378"/>
        </table:table-row>
        <table:table-row table:style-name="ro9" table:number-rows-repeated="1038690">
          <table:table-cell table:number-columns-repeated="6"/>
          <table:table-cell table:style-name="ce4" table:number-columns-repeated="16378"/>
        </table:table-row>
        <table:table-row table:style-name="ro9">
          <table:table-cell table:number-columns-repeated="6"/>
          <table:table-cell table:style-name="ce4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E4"/>
            <calcext:condition calcext:apply-style-name="cf6" calcext:value="=&quot;Non conforme&quot;" calcext:base-cell-address="Test_fonctionnel.E4"/>
            <calcext:condition calcext:apply-style-name="cf5" calcext:value="=&quot;Conforme&quot;" calcext:base-cell-address="Test_fonctionnel.E4"/>
            <calcext:condition calcext:apply-style-name="cf11" calcext:value="=0" calcext:base-cell-address="Test_fonctionnel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8:09:47.73306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Estelle Meret</meta:initial-creator>
    <meta:creation-date>2017-10-20T23:41:04Z</meta:creation-date>
    <dc:date>2026-05-05T11:09:22.594671800</dc:date>
    <meta:editing-cycles>40</meta:editing-cycles>
    <meta:editing-duration>PT1H54M11S</meta:editing-duration>
    <meta:document-statistic meta:table-count="1" meta:cell-count="144" meta:object-count="0"/>
  </office:meta>
</office:document-meta>
</file>